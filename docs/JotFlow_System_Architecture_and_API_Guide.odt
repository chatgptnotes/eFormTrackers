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1">
      <style:paragraph-properties fo:margin-top="0in" fo:margin-bottom="0in"/>
    </style:style>
    <style:style style:name="P44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</office:automatic-styles>
  <office:body>
    <office:text>
      <text:p text:style-name="Title">JotFlow System Architecture and API Guide</text:p>
      <text:h text:style-name="Heading_20_1" text:outline-level="1"><text:bookmark-start text:name="jotflow"/>JotFlow<text:bookmark-end text:name="jotflow"/></text:h>
      <text:p text:style-name="First_20_paragraph">System Architecture and API Guide — Junior Developer Edition<text:line-break/>Prepared 19 July 2026</text:p>
      <text:p text:style-name="Text_20_body"><text:span text:style-name="T1">Security rule:</text:span> Do not put a real JotForm API key in this document, source code, browser URL, screenshot, Git repository, or frontend application. Keep it only in <text:span text:style-name="Source_20_Text">backend/.env</text:span>. If a key was shared publicly, rotate it in JotForm immediately.</text:p>
      <text:h text:style-name="Heading_20_2" text:outline-level="2"><text:bookmark-start text:name="what-this-project-does"/>1. What this project does<text:bookmark-end text:name="what-this-project-does"/></text:h>
      <text:p text:style-name="First_20_paragraph">JotFlow is an internal dashboard for JotForm Enterprise workflows. It reads forms, submissions, workflow tasks, and assigned-form prefills from JotForm; stores a usable copy in PostgreSQL; and lets the correct signed-in user approve, reject, complete, or fill a task.</text:p>
      <text:p text:style-name="Text_20_body"><text:span text:style-name="T1">Simple language:</text:span> JotForm is the workflow engine. JotFlow is the secure control panel that makes the workflow easy to see and operate.</text:p>
      <text:h text:style-name="Heading_20_2" text:outline-level="2"><text:bookmark-start text:name="architecture-at-a-glance"/>2. Architecture at a glance<text:bookmark-end text:name="architecture-at-a-glance"/></text:h>
      <text:p text:style-name="First_20_paragraph">Browser (React dashboard) | session cookie; never receives JotForm API key v Express backend (Node.js) |-- validates user, role, request body and task ownership |-- calls JotForm Enterprise API with APIKEY request header |-- reads/writes PostgreSQL |-- sends Socket.IO updates to the browser v JotForm Enterprise API PostgreSQL forms / submissions / workflow / prefills cached dashboard data, users, workflow tasks, history, session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Layer</text:p>
            </table:table-cell>
            <table:table-cell table:style-name="TableHeaderRowCell" office:value-type="string">
              <text:p text:style-name="Table_20_Heading">Technology</text:p>
            </table:table-cell>
            <table:table-cell table:style-name="TableHeaderRowCell" office:value-type="string">
              <text:p text:style-name="Table_20_Heading">Responsibility</text:p>
            </table:table-cell>
          </table:table-row>
        </table:table-header-rows>
        <table:table-row>
          <table:table-cell table:style-name="TableRowCell" office:value-type="string">
            <text:p text:style-name="Table_20_Contents">Frontend</text:p>
          </table:table-cell>
          <table:table-cell table:style-name="TableRowCell" office:value-type="string">
            <text:p text:style-name="Table_20_Contents">React, TypeScript, Vite, Tailwind, Socket.IO client</text:p>
          </table:table-cell>
          <table:table-cell table:style-name="TableRowCell" office:value-type="string">
            <text:p text:style-name="Table_20_Contents">Shows the dashboard and sends requests to the backend.</text:p>
          </table:table-cell>
        </table:table-row>
        <table:table-row>
          <table:table-cell table:style-name="TableRowCell" office:value-type="string">
            <text:p text:style-name="Table_20_Contents">Backend</text:p>
          </table:table-cell>
          <table:table-cell table:style-name="TableRowCell" office:value-type="string">
            <text:p text:style-name="Table_20_Contents">Express, Zod, Socket.IO, Pino</text:p>
          </table:table-cell>
          <table:table-cell table:style-name="TableRowCell" office:value-type="string">
            <text:p text:style-name="Table_20_Contents">Security boundary; integrates with JotForm and the database.</text:p>
          </table:table-cell>
        </table:table-row>
        <table:table-row>
          <table:table-cell table:style-name="TableRowCell" office:value-type="string">
            <text:p text:style-name="Table_20_Contents">Database</text:p>
          </table:table-cell>
          <table:table-cell table:style-name="TableRowCell" office:value-type="string">
            <text:p text:style-name="Table_20_Contents">PostgreSQL</text:p>
          </table:table-cell>
          <table:table-cell table:style-name="TableRowCell" office:value-type="string">
            <text:p text:style-name="Table_20_Contents">Stores synchronized submissions, task lists, sessions, users, notifications and history.</text:p>
          </table:table-cell>
        </table:table-row>
        <table:table-row>
          <table:table-cell table:style-name="TableRowCell" office:value-type="string">
            <text:p text:style-name="Table_20_Contents">Workflow provider</text:p>
          </table:table-cell>
          <table:table-cell table:style-name="TableRowCell" office:value-type="string">
            <text:p text:style-name="Table_20_Contents">JotForm Enterprise</text:p>
          </table:table-cell>
          <table:table-cell table:style-name="TableRowCell" office:value-type="string">
            <text:p text:style-name="Table_20_Contents">Owns forms, submissions, workflow instances, tasks, outcomes and prefill records.</text:p>
          </table:table-cell>
        </table:table-row>
        <table:table-row>
          <table:table-cell table:style-name="TableRowCell" office:value-type="string">
            <text:p text:style-name="Table_20_Contents">Deployment</text:p>
          </table:table-cell>
          <table:table-cell table:style-name="TableRowCell" office:value-type="string">
            <text:p text:style-name="Table_20_Contents">Windows IIS + ARR reverse proxy + Node backend</text:p>
          </table:table-cell>
          <table:table-cell table:style-name="TableRowCell" office:value-type="string">
            <text:p text:style-name="Table_20_Contents">IIS exposes the site; Node normally listens on port 3001; PostgreSQL normally uses 5432.</text:p>
          </table:table-cell>
        </table:table-row>
      </table:table>
      <text:h text:style-name="Heading_20_2" text:outline-level="2"><text:bookmark-start text:name="the-important-ids"/>3. The important IDs<text:bookmark-end text:name="the-important-ids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ID</text:p>
            </table:table-cell>
            <table:table-cell table:style-name="TableHeaderRowCell" office:value-type="string">
              <text:p text:style-name="Table_20_Heading">Meaning</text:p>
            </table:table-cell>
            <table:table-cell table:style-name="TableHeaderRowCell" office:value-type="string">
              <text:p text:style-name="Table_20_Heading">Where it comes from</text:p>
            </table:table-cell>
            <table:table-cell table:style-name="TableHeaderRowCell" office:value-type="string">
              <text:p text:style-name="Table_20_Heading">Example use</text:p>
            </table:table-cell>
          </table:table-row>
        </table:table-header-rows>
        <table:table-row>
          <table:table-cell table:style-name="TableRowCell" office:value-type="string">
            <text:p text:style-name="Table_20_Contents">Parent form ID</text:p>
          </table:table-cell>
          <table:table-cell table:style-name="TableRowCell" office:value-type="string">
            <text:p text:style-name="Table_20_Contents">The form a requester initially submits.</text:p>
          </table:table-cell>
          <table:table-cell table:style-name="TableRowCell" office:value-type="string">
            <text:p text:style-name="Table_20_Contents"><text:span text:style-name="Source_20_Text">GET /user/forms</text:span>, then <text:span text:style-name="Source_20_Text">content[].id</text:span>.</text:p>
          </table:table-cell>
          <table:table-cell table:style-name="TableRowCell" office:value-type="string">
            <text:p text:style-name="Table_20_Contents">List its submissions.</text:p>
          </table:table-cell>
        </table:table-row>
        <table:table-row>
          <table:table-cell table:style-name="TableRowCell" office:value-type="string">
            <text:p text:style-name="Table_20_Contents">Submission ID</text:p>
          </table:table-cell>
          <table:table-cell table:style-name="TableRowCell" office:value-type="string">
            <text:p text:style-name="Table_20_Contents">One request submitted to a parent form.</text:p>
          </table:table-cell>
          <table:table-cell table:style-name="TableRowCell" office:value-type="string">
            <text:p text:style-name="Table_20_Contents"><text:span text:style-name="Source_20_Text">GET /form/{formId}/submissions</text:span>, then <text:span text:style-name="Source_20_Text">content[].id</text:span>.</text:p>
          </table:table-cell>
          <table:table-cell table:style-name="TableRowCell" office:value-type="string">
            <text:p text:style-name="Table_20_Contents">Find its workflow tasks.</text:p>
          </table:table-cell>
        </table:table-row>
        <table:table-row>
          <table:table-cell table:style-name="TableRowCell" office:value-type="string">
            <text:p text:style-name="Table_20_Contents">Workflow instance ID</text:p>
          </table:table-cell>
          <table:table-cell table:style-name="TableRowCell" office:value-type="string">
            <text:p text:style-name="Table_20_Contents">One running copy of the workflow for a submission.</text:p>
          </table:table-cell>
          <table:table-cell table:style-name="TableRowCell" office:value-type="string">
            <text:p text:style-name="Table_20_Contents"><text:span text:style-name="Source_20_Text">GET /submission/{submissionId}?addWorkflowStatus=1</text:span>, then <text:span text:style-name="Source_20_Text">content.workflowInstanceID</text:span>.</text:p>
          </table:table-cell>
          <table:table-cell table:style-name="TableRowCell" office:value-type="string">
            <text:p text:style-name="Table_20_Contents">Inspect the full workflow task list.</text:p>
          </table:table-cell>
        </table:table-row>
        <table:table-row>
          <table:table-cell table:style-name="TableRowCell" office:value-type="string">
            <text:p text:style-name="Table_20_Contents">Task ID</text:p>
          </table:table-cell>
          <table:table-cell table:style-name="TableRowCell" office:value-type="string">
            <text:p text:style-name="Table_20_Contents">One action assigned to a person.</text:p>
          </table:table-cell>
          <table:table-cell table:style-name="TableRowCell" office:value-type="string">
            <text:p text:style-name="Table_20_Contents"><text:span text:style-name="Source_20_Text">GET /workflow/submission/{submissionId}/tasks</text:span> or instance task list, then <text:span text:style-name="Source_20_Text">task.id</text:span>.</text:p>
          </table:table-cell>
          <table:table-cell table:style-name="TableRowCell" office:value-type="string">
            <text:p text:style-name="Table_20_Contents">Build assigned-form link or complete the task.</text:p>
          </table:table-cell>
        </table:table-row>
        <table:table-row>
          <table:table-cell table:style-name="TableRowCell" office:value-type="string">
            <text:p text:style-name="Table_20_Contents">Assigned task form ID</text:p>
          </table:table-cell>
          <table:table-cell table:style-name="TableRowCell" office:value-type="string">
            <text:p text:style-name="Table_20_Contents">The child form used by an <text:span text:style-name="Source_20_Text">workflow_assign_form</text:span> step.</text:p>
          </table:table-cell>
          <table:table-cell table:style-name="TableRowCell" office:value-type="string">
            <text:p text:style-name="Table_20_Contents">Workflow task: <text:span text:style-name="Source_20_Text">element.internalFormID</text:span>.</text:p>
          </table:table-cell>
          <table:table-cell table:style-name="TableRowCell" office:value-type="string">
            <text:p text:style-name="Table_20_Contents">Read the prefill records.</text:p>
          </table:table-cell>
        </table:table-row>
        <table:table-row>
          <table:table-cell table:style-name="TableRowCell" office:value-type="string">
            <text:p text:style-name="Table_20_Contents">Prefill URL ID</text:p>
          </table:table-cell>
          <table:table-cell table:style-name="TableRowCell" office:value-type="string">
            <text:p text:style-name="Table_20_Contents">The per-submission token used in the child-form URL.</text:p>
          </table:table-cell>
          <table:table-cell table:style-name="TableRowCell" office:value-type="string">
            <text:p text:style-name="Table_20_Contents"><text:span text:style-name="Source_20_Text">GET /form/{assignedFormId}/prefills</text:span>, nested <text:span text:style-name="Source_20_Text">urls[].id</text:span>.</text:p>
          </table:table-cell>
          <table:table-cell table:style-name="TableRowCell" office:value-type="string">
            <text:p text:style-name="Table_20_Contents">Build the form-fill link.</text:p>
          </table:table-cell>
        </table:table-row>
      </table:table>
      <text:p text:style-name="First_20_paragraph"><text:span text:style-name="T1">The starting point:</text:span> The first API call in a full project sync is <text:span text:style-name="Source_20_Text">GET /user/forms</text:span>. It returns form IDs. From a form ID, JotFlow obtains submissions. From a submission, it obtains tasks. Do not start by guessing a workflow ID.</text:p>
      <text:h text:style-name="Heading_20_2" text:outline-level="2"><text:bookmark-start text:name="base-url-and-authentication"/>4. Base URL and authentication<text:bookmark-end text:name="base-url-and-authentication"/></text:h>
      <text:p text:style-name="First_20_paragraph">Configured API base URL for this deployment:</text:p>
      <text:p text:style-name="P1">https://eforms.mediaoffice.ae/API</text:p>
      <text:p text:style-name="First_20_paragraph">Configured browser/form host:</text:p>
      <text:p text:style-name="P2">https://eforms.mediaoffice.ae</text:p>
      <text:p text:style-name="First_20_paragraph">Every direct JotForm API request in Postman uses this header:</text:p>
      <text:p text:style-name="P3">APIKEY: &lt;PUT_YOUR_JOTFORM_API_KEY_HERE&gt;</text:p>
      <text:p text:style-name="First_20_paragraph">For the configured team-scoped user profile, use <text:span text:style-name="Source_20_Text">teamID</text:span> as a query parameter where shown below. The backend adds it automatically. Some endpoints also accept the following header in the current integration:</text:p>
      <text:p text:style-name="P4">jf-team-id: 260541093809054</text:p>
      <text:p text:style-name="First_20_paragraph"><text:span text:style-name="T1">Never add </text:span><text:span text:style-name="Source_20_Text">APIKEY</text:span><text:span text:style-name="T1"> to a browser task URL.</text:span> API keys authorize server-to-server API calls. A task recipient URL has a different authorization model: a prefill ID for assigned forms, or an issued access/share token for approval/task links.</text:p>
      <text:h text:style-name="Heading_20_2" text:outline-level="2"><text:bookmark-start text:name="full-discovery-flow-from-zero-to-a-task-url"/>5. Full discovery flow: from zero to a task URL<text:bookmark-end text:name="full-discovery-flow-from-zero-to-a-task-url"/></text:h>
      <text:h text:style-name="Heading_20_3" text:outline-level="3"><text:bookmark-start text:name="step-1-list-all-forms-first-call"/>Step 1 — List all forms (first call)<text:bookmark-end text:name="step-1-list-all-forms-first-call"/></text:h>
      <text:p text:style-name="P5">GET https://eforms.mediaoffice.ae/API/user/forms?limit=1000&amp;teamID=260541093809054</text:p>
      <text:p text:style-name="P6">APIKEY: &lt;YOUR_API_KEY&gt;</text:p>
      <text:p text:style-name="First_20_paragraph">Find the parent workflow form. Save its <text:span text:style-name="Source_20_Text">content[].id</text:span> as <text:span text:style-name="Source_20_Text">PARENT_FORM_ID</text:span>. In an enterprise-scoped JotForm API profile, the equivalent path may be <text:span text:style-name="Source_20_Text">/API/enterprise/forms</text:span>; this project automatically chooses the correct scope from its profile configuration.</text:p>
      <text:h text:style-name="Heading_20_3" text:outline-level="3"><text:bookmark-start text:name="step-2-list-submissions-for-the-parent-form"/>Step 2 — List submissions for the parent form<text:bookmark-end text:name="step-2-list-submissions-for-the-parent-form"/></text:h>
      <text:p text:style-name="P7">GET https://eforms.mediaoffice.ae/API/form/{PARENT_FORM_ID}/submissions?limit=1000&amp;offset=0&amp;orderby=created_at&amp;direction=DESC&amp;addWorkflowStatus=1</text:p>
      <text:p text:style-name="P8">APIKEY: &lt;YOUR_API_KEY&gt;</text:p>
      <text:p text:style-name="First_20_paragraph">Each <text:span text:style-name="Source_20_Text">content[].id</text:span> is a <text:span text:style-name="Source_20_Text">SUBMISSION_ID</text:span>. The descending order requests newest first. Do not assume <text:span text:style-name="Source_20_Text">content[0]</text:span> is the right request without confirming the requester, date, and form answers.</text:p>
      <text:h text:style-name="Heading_20_3" text:outline-level="3"><text:bookmark-start text:name="step-3-get-task-list-for-one-submission"/>Step 3 — Get task list for one submission<text:bookmark-end text:name="step-3-get-task-list-for-one-submission"/></text:h>
      <text:p text:style-name="P9">GET https://eforms.mediaoffice.ae/API/workflow/submission/{SUBMISSION_ID}/tasks</text:p>
      <text:p text:style-name="P10">APIKEY: &lt;YOUR_API_KEY&gt;</text:p>
      <text:p text:style-name="First_20_paragraph">This is the preferred task lookup. Find a task where <text:span text:style-name="Source_20_Text">status</text:span> is <text:span text:style-name="Source_20_Text">ACTIVE</text:span> and its assignee email matches the person who should act. The task ID is <text:span text:style-name="Source_20_Text">id</text:span>.</text:p>
      <text:p text:style-name="P11">{</text:p>
      <text:p text:style-name="P12"><text:s text:c="2"/>"id": "TASK_ID_TO_USE",</text:p>
      <text:p text:style-name="P13"><text:s text:c="2"/>"status": "ACTIVE",</text:p>
      <text:p text:style-name="P14"><text:s text:c="2"/>"element": { "type": "workflow_assign_form", "internalFormID": "CHILD_FORM_ID" },</text:p>
      <text:p text:style-name="P15"><text:s text:c="2"/>"properties": { "assigneeEmail": "person@example.com" }</text:p>
      <text:p text:style-name="P16">}</text:p>
      <text:h text:style-name="Heading_20_3" text:outline-level="3"><text:bookmark-start text:name="optional-step-3b-get-workflow-instance-detail"/>Optional Step 3b — Get workflow instance detail<text:bookmark-end text:name="optional-step-3b-get-workflow-instance-detail"/></text:h>
      <text:p text:style-name="First_20_paragraph">Use this when you need the full instance, resource shares, or the submission endpoint did not return tasks.</text:p>
      <text:p text:style-name="P17">GET https://eforms.mediaoffice.ae/API/submission/{SUBMISSION_ID}?addWorkflowStatus=1</text:p>
      <text:p text:style-name="P18">APIKEY: &lt;YOUR_API_KEY&gt;</text:p>
      <text:p text:style-name="P19"/>
      <text:p text:style-name="P20">Then read content.workflowInstanceID, and call:</text:p>
      <text:p text:style-name="P21">GET https://eforms.mediaoffice.ae/API/workflow/instance/{WORKFLOW_INSTANCE_ID}</text:p>
      <text:h text:style-name="Heading_20_3" text:outline-level="3"><text:bookmark-start text:name="step-4-get-prefill-records-for-an-assigned-form-task"/>Step 4 — Get prefill records for an assigned-form task<text:bookmark-end text:name="step-4-get-prefill-records-for-an-assigned-form-task"/></text:h>
      <text:p text:style-name="P22">GET https://eforms.mediaoffice.ae/API/form/{CHILD_FORM_ID}/prefills?limit=1000&amp;offset=0</text:p>
      <text:p text:style-name="P23">APIKEY: &lt;YOUR_API_KEY&gt;</text:p>
      <text:p text:style-name="P24">jf-team-id: 260541093809054</text:p>
      <text:p text:style-name="First_20_paragraph">The response contains prefill templates in <text:span text:style-name="Source_20_Text">content[]</text:span>, with per-submission records nested in <text:span text:style-name="Source_20_Text">content[].urls[]</text:span>. Select the record where:</text:p>
      <text:p text:style-name="P25">urls[].settings.id === SUBMISSION_ID</text:p>
      <text:p text:style-name="First_20_paragraph">Use its nested <text:span text:style-name="Source_20_Text">urls[].id</text:span>, not the outer <text:span text:style-name="Source_20_Text">content[].id</text:span> and not <text:span text:style-name="Source_20_Text">urls[].prefill_id</text:span>.</text:p>
      <text:h text:style-name="Heading_20_3" text:outline-level="3"><text:bookmark-start text:name="step-5-build-the-assigned-form-browser-url"/>Step 5 — Build the assigned-form browser URL<text:bookmark-end text:name="step-5-build-the-assigned-form-browser-url"/></text:h>
      <text:p text:style-name="P26">https://eforms.mediaoffice.ae/{CHILD_FORM_ID}/prefill/{PREFILL_URL_ID}?workflowAssignFormTask=1&amp;taskID={TASK_ID}</text:p>
      <text:p text:style-name="First_20_paragraph">Example structure only:</text:p>
      <text:p text:style-name="P27">https://eforms.mediaoffice.ae/260825008947058/prefill/6a5b77c3663633bf7e959cde9126?workflowAssignFormTask=1&amp;taskID=TASK_ID</text:p>
      <text:p text:style-name="First_20_paragraph">This is a <text:span text:style-name="T1">browser URL</text:span>, not a Postman API endpoint. It is valid only for an active <text:span text:style-name="Source_20_Text">workflow_assign_form</text:span> task and the matching parent submission.</text:p>
      <text:h text:style-name="Heading_20_2" text:outline-level="2"><text:bookmark-start text:name="task-types-and-what-url-can-be-created"/>6. Task types and what URL can be created<text:bookmark-end text:name="task-types-and-what-url-can-be-created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Table_20_Heading">Task type</text:p>
            </table:table-cell>
            <table:table-cell table:style-name="TableHeaderRowCell" office:value-type="string">
              <text:p text:style-name="Table_20_Heading">What to open</text:p>
            </table:table-cell>
            <table:table-cell table:style-name="TableHeaderRowCell" office:value-type="string">
              <text:p text:style-name="Table_20_Heading">Can it be built from IDs alone?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20_Text">workflow_assign_form</text:span></text:p>
          </table:table-cell>
          <table:table-cell table:style-name="TableRowCell" office:value-type="string">
            <text:p text:style-name="Table_20_Contents">Prefilled child form URL.</text:p>
          </table:table-cell>
          <table:table-cell table:style-name="TableRowCell" office:value-type="string">
            <text:p text:style-name="Table_20_Contents">Yes, when the Prefills API provides a matching nested <text:span text:style-name="Source_20_Text">urls[].id</text:span>.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workflow_approval</text:span></text:p>
          </table:table-cell>
          <table:table-cell table:style-name="TableRowCell" office:value-type="string">
            <text:p text:style-name="Table_20_Contents">JotForm approval page.</text:p>
          </table:table-cell>
          <table:table-cell table:style-name="TableRowCell" office:value-type="string">
            <text:p text:style-name="Table_20_Contents">No. It normally requires the access/share token JotForm issued. API key must not be put in the URL.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workflow_assign_task</text:span></text:p>
          </table:table-cell>
          <table:table-cell table:style-name="TableRowCell" office:value-type="string">
            <text:p text:style-name="Table_20_Contents">JotForm task link.</text:p>
          </table:table-cell>
          <table:table-cell table:style-name="TableRowCell" office:value-type="string">
            <text:p text:style-name="Table_20_Contents">Usually no. Use JotForm's returned access/share link or the app's email-link resolver.</text:p>
          </table:table-cell>
        </table:table-row>
      </table:table>
      <text:h text:style-name="Heading_20_2" text:outline-level="2"><text:bookmark-start text:name="completing-approving-or-rejecting-a-task"/>7. Completing, approving, or rejecting a task<text:bookmark-end text:name="completing-approving-or-rejecting-a-task"/></text:h>
      <text:p text:style-name="First_20_paragraph">The browser calls the app, not JotForm directly:</text:p>
      <text:p text:style-name="P28">POST /api/workflow-action</text:p>
      <text:p text:style-name="P29">Content-Type: application/json</text:p>
      <text:p text:style-name="P30"/>
      <text:p text:style-name="P31">{</text:p>
      <text:p text:style-name="P32"><text:s text:c="2"/>"submissionId": "SUBMISSION_ID",</text:p>
      <text:p text:style-name="P33"><text:s text:c="2"/>"taskId": "TASK_ID",</text:p>
      <text:p text:style-name="P34"><text:s text:c="2"/>"action": "approve",</text:p>
      <text:p text:style-name="P35"><text:s text:c="2"/>"comment": "Optional comment",</text:p>
      <text:p text:style-name="P36"><text:s text:c="2"/>"signature": "Optional signature value"</text:p>
      <text:p text:style-name="P37">}</text:p>
      <text:p text:style-name="First_20_paragraph">The backend verifies the user session, finds the active task assigned to that user, determines the JotForm outcome ID, then sends this protected server-to-server request:</text:p>
      <text:p text:style-name="P38">POST https://eforms.mediaoffice.ae/API/workflow/task/{TASK_ID}/complete</text:p>
      <text:p text:style-name="P39">APIKEY: &lt;SERVER_SIDE_API_KEY&gt;</text:p>
      <text:p text:style-name="P40">Content-Type: application/json</text:p>
      <text:p text:style-name="P41"/>
      <text:p text:style-name="P42">{ "outcomeID": 1, "comment": "Optional comment", "signature": "Optional signature value" }</text:p>
      <text:p text:style-name="First_20_paragraph"><text:span text:style-name="T1">Do not let the frontend call this completion API with the API key.</text:span> It would expose a powerful secret to every browser user.</text:p>
      <text:h text:style-name="Heading_20_2" text:outline-level="2"><text:bookmark-start text:name="application-apis-used-by-the-react-dashboard"/>8. Application APIs used by the React dashboard<text:bookmark-end text:name="application-apis-used-by-the-react-dashboard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Method and route</text:p>
            </table:table-cell>
            <table:table-cell table:style-name="TableHeaderRowCell" office:value-type="string">
              <text:p text:style-name="Table_20_Heading">Who can use it</text:p>
            </table:table-cell>
            <table:table-cell table:style-name="TableHeaderRowCell" office:value-type="string">
              <text:p text:style-name="Table_20_Heading">Purpos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20_Text">GET /api/health</text:span></text:p>
          </table:table-cell>
          <table:table-cell table:style-name="TableRowCell" office:value-type="string">
            <text:p text:style-name="Table_20_Contents">Public</text:p>
          </table:table-cell>
          <table:table-cell table:style-name="TableRowCell" office:value-type="string">
            <text:p text:style-name="Table_20_Contents">Basic liveness check.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GET /api/health/ready</text:span></text:p>
          </table:table-cell>
          <table:table-cell table:style-name="TableRowCell" office:value-type="string">
            <text:p text:style-name="Table_20_Contents">Public</text:p>
          </table:table-cell>
          <table:table-cell table:style-name="TableRowCell" office:value-type="string">
            <text:p text:style-name="Table_20_Contents">Checks PostgreSQL as well as the server.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GET /api/jotform?path=user/forms</text:span></text:p>
          </table:table-cell>
          <table:table-cell table:style-name="TableRowCell" office:value-type="string">
            <text:p text:style-name="Table_20_Contents">Signed-in user</text:p>
          </table:table-cell>
          <table:table-cell table:style-name="TableRowCell" office:value-type="string">
            <text:p text:style-name="Table_20_Contents">Safe backend proxy for a small allowlist of JotForm metadata routes.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GET /api/submissions</text:span></text:p>
          </table:table-cell>
          <table:table-cell table:style-name="TableRowCell" office:value-type="string">
            <text:p text:style-name="Table_20_Contents">Signed-in user</text:p>
          </table:table-cell>
          <table:table-cell table:style-name="TableRowCell" office:value-type="string">
            <text:p text:style-name="Table_20_Contents">Reads stored, permission-filtered dashboard submissions from PostgreSQL.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GET /api/workflow-tasks?submissionId=...</text:span></text:p>
          </table:table-cell>
          <table:table-cell table:style-name="TableRowCell" office:value-type="string">
            <text:p text:style-name="Table_20_Contents">Signed-in user</text:p>
          </table:table-cell>
          <table:table-cell table:style-name="TableRowCell" office:value-type="string">
            <text:p text:style-name="Table_20_Contents">Gets and flattens current workflow tasks for one submission.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GET /api/email-url?formId=...&amp;submissionId=...&amp;taskId=...</text:span></text:p>
          </table:table-cell>
          <table:table-cell table:style-name="TableRowCell" office:value-type="string">
            <text:p text:style-name="Table_20_Contents">Signed-in user</text:p>
          </table:table-cell>
          <table:table-cell table:style-name="TableRowCell" office:value-type="string">
            <text:p text:style-name="Table_20_Contents">Resolves a safe task/action link, including stored email/share links where available.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POST /api/workflow-action</text:span></text:p>
          </table:table-cell>
          <table:table-cell table:style-name="TableRowCell" office:value-type="string">
            <text:p text:style-name="Table_20_Contents">Signed-in assigned user</text:p>
          </table:table-cell>
          <table:table-cell table:style-name="TableRowCell" office:value-type="string">
            <text:p text:style-name="Table_20_Contents">Approve, reject, or complete the active task.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POST /api/admin/sync-all</text:span></text:p>
          </table:table-cell>
          <table:table-cell table:style-name="TableRowCell" office:value-type="string">
            <text:p text:style-name="Table_20_Contents">Admin</text:p>
          </table:table-cell>
          <table:table-cell table:style-name="TableRowCell" office:value-type="string">
            <text:p text:style-name="Table_20_Contents">Re-sync forms and submissions from JotForm.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GET /api/admin/sync-all-stream</text:span></text:p>
          </table:table-cell>
          <table:table-cell table:style-name="TableRowCell" office:value-type="string">
            <text:p text:style-name="Table_20_Contents">Admin</text:p>
          </table:table-cell>
          <table:table-cell table:style-name="TableRowCell" office:value-type="string">
            <text:p text:style-name="Table_20_Contents">Same sync with server-sent progress events.</text:p>
          </table:table-cell>
        </table:table-row>
      </table:table>
      <text:h text:style-name="Heading_20_2" text:outline-level="2"><text:bookmark-start text:name="background-synchronization-and-live-updates"/>9. Background synchronization and live updates<text:bookmark-end text:name="background-synchronization-and-live-updates"/></text:h>
      <text:list text:style-name="L1">
        <text:list-item>
          <text:p text:style-name="P43">JotForm can send a webhook when a submission is created or changed.</text:p>
        </text:list-item>
        <text:list-item>
          <text:p text:style-name="P43">The backend fetches the authoritative submission and workflow task state.</text:p>
        </text:list-item>
        <text:list-item>
          <text:p text:style-name="P43">The poller also periodically lists forms and submissions, so the app can recover if a webhook is missed.</text:p>
        </text:list-item>
        <text:list-item>
          <text:p text:style-name="P43">The backend saves normalized data to PostgreSQL.</text:p>
        </text:list-item>
        <text:list-item>
          <text:p text:style-name="P43">The backend emits <text:span text:style-name="Source_20_Text">submissions:updated</text:span> through Socket.IO.</text:p>
        </text:list-item>
        <text:list-item>
          <text:p text:style-name="P43">The React dashboard reloads its database-backed view.</text:p>
        </text:list-item>
      </text:list>
      <text:p text:style-name="First_20_paragraph">For assigned-form tasks, JotForm may create the prefill record shortly after the task appears. The backend checks the Prefills API and marks the task <text:span text:style-name="Source_20_Text">pending</text:span>, <text:span text:style-name="Source_20_Text">ready</text:span>, or <text:span text:style-name="Source_20_Text">not_required</text:span>. It does not open a normal bare child-form URL while a configured prefill is still pending.</text:p>
      <text:h text:style-name="Heading_20_2" text:outline-level="2"><text:bookmark-start text:name="postman-checklist"/>10. Postman checklist<text:bookmark-end text:name="postman-checklist"/></text:h>
      <text:list text:style-name="L2">
        <text:list-item>
          <text:p text:style-name="P44">Create a request with method <text:span text:style-name="T1">GET</text:span>.</text:p>
        </text:list-item>
        <text:list-item>
          <text:p text:style-name="P44">Use the exact API URL from the relevant step.</text:p>
        </text:list-item>
        <text:list-item>
          <text:p text:style-name="P44">Add <text:span text:style-name="Source_20_Text">APIKEY</text:span> under Headers. Do not use Authorization Bearer unless JotForm explicitly requires it.</text:p>
        </text:list-item>
        <text:list-item>
          <text:p text:style-name="P44">For team-scoped calls, add <text:span text:style-name="Source_20_Text">teamID=260541093809054</text:span> to the query string. For the prefill endpoint, also use <text:span text:style-name="Source_20_Text">jf-team-id</text:span> if your account requires it.</text:p>
        </text:list-item>
        <text:list-item>
          <text:p text:style-name="P44">Do not test from a browser-only API client if it reports CORS/network errors; use Postman desktop, Hoppscotch Proxy/Agent, or curl. This is a browser restriction, not necessarily a bad URL.</text:p>
        </text:list-item>
        <text:list-item>
          <text:p text:style-name="P44">Never paste a live key into a chat, screenshot, ticket, or shared collection.</text:p>
        </text:list-item>
      </text:list>
      <text:h text:style-name="Heading_20_2" text:outline-level="2"><text:bookmark-start text:name="troubleshooting-map"/>11. Troubleshooting map<text:bookmark-end text:name="troubleshooting-map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Table_20_Heading">Symptom</text:p>
            </table:table-cell>
            <table:table-cell table:style-name="TableHeaderRowCell" office:value-type="string">
              <text:p text:style-name="Table_20_Heading">Likely cause</text:p>
            </table:table-cell>
            <table:table-cell table:style-name="TableHeaderRowCell" office:value-type="string">
              <text:p text:style-name="Table_20_Heading">Check first</text:p>
            </table:table-cell>
          </table:table-row>
        </table:table-header-rows>
        <table:table-row>
          <table:table-cell table:style-name="TableRowCell" office:value-type="string">
            <text:p text:style-name="Table_20_Contents">401 or 403 from JotForm</text:p>
          </table:table-cell>
          <table:table-cell table:style-name="TableRowCell" office:value-type="string">
            <text:p text:style-name="Table_20_Contents">Wrong/expired key, wrong team scope, or insufficient permission.</text:p>
          </table:table-cell>
          <table:table-cell table:style-name="TableRowCell" office:value-type="string">
            <text:p text:style-name="Table_20_Contents">APIKEY header; profile scope; <text:span text:style-name="Source_20_Text">teamID</text:span>.</text:p>
          </table:table-cell>
        </table:table-row>
        <table:table-row>
          <table:table-cell table:style-name="TableRowCell" office:value-type="string">
            <text:p text:style-name="Table_20_Contents">Task list is empty</text:p>
          </table:table-cell>
          <table:table-cell table:style-name="TableRowCell" office:value-type="string">
            <text:p text:style-name="Table_20_Contents">Wrong submission ID, workflow is not created yet, or endpoint shape differs.</text:p>
          </table:table-cell>
          <table:table-cell table:style-name="TableRowCell" office:value-type="string">
            <text:p text:style-name="Table_20_Contents"><text:span text:style-name="Source_20_Text">/workflow/submission/{submissionId}/tasks</text:span>, then instance lookup fallback.</text:p>
          </table:table-cell>
        </table:table-row>
        <table:table-row>
          <table:table-cell table:style-name="TableRowCell" office:value-type="string">
            <text:p text:style-name="Table_20_Contents">No matching prefill</text:p>
          </table:table-cell>
          <table:table-cell table:style-name="TableRowCell" office:value-type="string">
            <text:p text:style-name="Table_20_Contents">Prefill is still being created or the wrong parent submission was used.</text:p>
          </table:table-cell>
          <table:table-cell table:style-name="TableRowCell" office:value-type="string">
            <text:p text:style-name="Table_20_Contents">Match <text:span text:style-name="Source_20_Text">urls[].settings.id</text:span> exactly to the parent submission ID; retry shortly.</text:p>
          </table:table-cell>
        </table:table-row>
        <table:table-row>
          <table:table-cell table:style-name="TableRowCell" office:value-type="string">
            <text:p text:style-name="Table_20_Contents">Assigned-form URL opens wrong data</text:p>
          </table:table-cell>
          <table:table-cell table:style-name="TableRowCell" office:value-type="string">
            <text:p text:style-name="Table_20_Contents">Used the outer prefill template ID instead of nested URL ID.</text:p>
          </table:table-cell>
          <table:table-cell table:style-name="TableRowCell" office:value-type="string">
            <text:p text:style-name="Table_20_Contents">Use <text:span text:style-name="Source_20_Text">urls[].id</text:span> only.</text:p>
          </table:table-cell>
        </table:table-row>
        <table:table-row>
          <table:table-cell table:style-name="TableRowCell" office:value-type="string">
            <text:p text:style-name="Table_20_Contents">Approval link has access denied</text:p>
          </table:table-cell>
          <table:table-cell table:style-name="TableRowCell" office:value-type="string">
            <text:p text:style-name="Table_20_Contents">Approval/task link needs JotForm-issued access token or share link.</text:p>
          </table:table-cell>
          <table:table-cell table:style-name="TableRowCell" office:value-type="string">
            <text:p text:style-name="Table_20_Contents">Use <text:span text:style-name="Source_20_Text">/api/email-url</text:span> or stored JotForm access link; do not append APIKEY.</text:p>
          </table:table-cell>
        </table:table-row>
        <table:table-row>
          <table:table-cell table:style-name="TableRowCell" office:value-type="string">
            <text:p text:style-name="Table_20_Contents">Hoppscotch says network/CORS error</text:p>
          </table:table-cell>
          <table:table-cell table:style-name="TableRowCell" office:value-type="string">
            <text:p text:style-name="Table_20_Contents">Browser cannot call the API cross-origin.</text:p>
          </table:table-cell>
          <table:table-cell table:style-name="TableRowCell" office:value-type="string">
            <text:p text:style-name="Table_20_Contents">Use Postman desktop or Hoppscotch Proxy/Agent.</text:p>
          </table:table-cell>
        </table:table-row>
      </table:table>
      <text:h text:style-name="Heading_20_2" text:outline-level="2"><text:bookmark-start text:name="key-source-files"/>12. Key source files<text:bookmark-end text:name="key-source-files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File</text:p>
            </table:table-cell>
            <table:table-cell table:style-name="TableHeaderRowCell" office:value-type="string">
              <text:p text:style-name="Table_20_Heading">Why a junior should know i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20_Text">backend/lib/jotform.js</text:span></text:p>
          </table:table-cell>
          <table:table-cell table:style-name="TableRowCell" office:value-type="string">
            <text:p text:style-name="Table_20_Contents">One shared JotForm HTTP client; adds APIKEY header, profile scope, team ID and timeout.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backend/lib/profiles.js</text:span></text:p>
          </table:table-cell>
          <table:table-cell table:style-name="TableRowCell" office:value-type="string">
            <text:p text:style-name="Table_20_Contents">Defines which JotForm host, API base URL, team and secret each profile uses.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backend/lib/prefill.js</text:span></text:p>
          </table:table-cell>
          <table:table-cell table:style-name="TableRowCell" office:value-type="string">
            <text:p text:style-name="Table_20_Contents">Reads Prefills API, matches nested URL records to a submission, and builds assigned-form URLs.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backend/lib/workflow-task.js</text:span></text:p>
          </table:table-cell>
          <table:table-cell table:style-name="TableRowCell" office:value-type="string">
            <text:p text:style-name="Table_20_Contents">Converts JotForm's nested task JSON into fields used by the frontend.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backend/routes/submissions-actions.js</text:span></text:p>
          </table:table-cell>
          <table:table-cell table:style-name="TableRowCell" office:value-type="string">
            <text:p text:style-name="Table_20_Contents">Reads tasks and safely completes approve/reject actions.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backend/routes/admin-sync.js</text:span></text:p>
          </table:table-cell>
          <table:table-cell table:style-name="TableRowCell" office:value-type="string">
            <text:p text:style-name="Table_20_Contents">Full data synchronization from forms to submissions to workflow tasks.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backend/routes/forms-workflow.js</text:span></text:p>
          </table:table-cell>
          <table:table-cell table:style-name="TableRowCell" office:value-type="string">
            <text:p text:style-name="Table_20_Contents">Resolves browser-safe action and task links.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backend/app.js</text:span></text:p>
          </table:table-cell>
          <table:table-cell table:style-name="TableRowCell" office:value-type="string">
            <text:p text:style-name="Table_20_Contents">Express middleware, security controls and all route mounting.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frontend/src/pages/ModernDashboard.tsx</text:span></text:p>
          </table:table-cell>
          <table:table-cell table:style-name="TableRowCell" office:value-type="string">
            <text:p text:style-name="Table_20_Contents">Main personal action queue.</text:p>
          </table:table-cell>
        </table:table-row>
      </table:table>
      <text:h text:style-name="Heading_20_2" text:outline-level="2"><text:bookmark-start text:name="final-rule-of-thumb"/>13. Final rule of thumb<text:bookmark-end text:name="final-rule-of-thumb"/></text:h>
      <text:p text:style-name="First_20_paragraph"><text:span text:style-name="T1">Use IDs to discover data. Use the backend to protect secrets. Use issued task links to open tasks.</text:span><text:line-break/>Form ID → Submission ID → Task ID → (for assigned forms) Prefill URL ID → Browser UR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en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>JotFlow System Architecture and API Guide</dc:title>
    <dc:description/>
    <dc:subject/>
    <meta:keyword/>
    <dc:language>en</dc:language>
    <meta:initial-creator/>
    <dc:creator/>
    <meta:creation-date>2026-07-19T03:59:34Z</meta:creation-date>
    <dc:date>2026-07-19T03:59:34Z</dc:date>
  </office:meta>
</office:document-meta>
</file>